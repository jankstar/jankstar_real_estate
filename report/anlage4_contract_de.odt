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xmlns:py="http://genshi.edgewall.org/" office:version="1.4">
  <office:scripts/>
  <office:automatic-styles/>
  <office:body>
    <office:text>
      <?python first_item = record.items[0] if record.items else None
obj = first_item.objects[0].object if first_item and first_item.objects else None
obj_addr = obj.address if obj else None
prop_addr = record.property.address if record.property else None
display_obj_addr = obj_addr or prop_addr

def addr_line(addr):
    if not addr:
        return '—'
    street = addr.street_single_line or ''
    plz_ort = ((addr.postal_code or '') + ' ' + (addr.city or '')).strip()
    parts = [p for p in [street, plz_ort] if p]
    return ', '.join(parts) if parts else '—'

sig_date = _format(record.date_of_signature) if record.date_of_signature else _format(record.start_date)
?>
      <text:h text:style-name="Heading_1" text:outline-level="1">Anlage 4 zum Mietvertrag – Betriebskostenaufstellung</text:h>
      <text:p text:style-name="Standard">gemäß § 2 Betriebskostenverordnung (BetrKV)</text:p>
      <text:p text:style-name="Standard">Vertragsnummer: <text:span py:content="record.contract_number or '—'"/> · Stand: <text:span py:content="sig_date or '—'"/></text:p>
      <text:p text:style-name="Standard">Mietobjekt: <text:span py:content="addr_line(display_obj_addr)"/></text:p>
      <text:p text:style-name="Standard">Mieter: <text:span py:content="record.contractual_partner.name if record.contractual_partner else '—'"/></text:p>
      <text:p text:style-name="Standard">Mietbeginn: <text:span py:content="_format(record.start_date) if record.start_date else '—'"/></text:p>
      <text:p text:style-name="Standard">Diese Aufstellung benennt die Betriebskostenarten, die gemäß § 2 BetrKV auf den Mieter umgelegt werden und Gegenstand der jährlichen Betriebskostenabrechnung sind. Nur die nachfolgend mit "Ja" gekennzeichneten Positionen sind Bestandteil des Mietvertrages. Der angegebene Umlageschlüssel gilt vorbehaltlich abweichender gesetzlicher Regelungen (insbesondere HeizkostenV).</text:p>
      <table:table table:name="TableBK" py:if="bk_groups">
        <table:table-column table:number-columns-repeated="4"/>
        <table:table-row>
          <table:table-cell office:value-type="string">
            <text:p text:style-name="Table_20_Heading">§ 2 Nr.</text:p>
          </table:table-cell>
          <table:table-cell office:value-type="string">
            <text:p text:style-name="Table_20_Heading">Betriebskostenart</text:p>
          </table:table-cell>
          <table:table-cell office:value-type="string">
            <text:p text:style-name="Table_20_Heading">Umlegbar</text:p>
          </table:table-cell>
          <table:table-cell office:value-type="string">
            <text:p text:style-name="Table_20_Heading">Umlageschlüssel</text:p>
          </table:table-cell>
        </table:table-row>
        <py:for each="group in bk_groups">
          <table:table-row>
            <table:table-cell table:number-columns-spanned="4" office:value-type="string">
              <text:p text:style-name="Table_20_Heading"><text:span py:content="group['name']"/></text:p>
            </table:table-cell>
            <table:covered-table-cell/>
            <table:covered-table-cell/>
            <table:covered-table-cell/>
          </table:table-row>
          <table:table-row py:for="row in group['rows']">
            <table:table-cell office:value-type="string">
              <text:p text:style-name="Table_20_Contents"><text:span py:content="row['betrKV_nr']"/></text:p>
            </table:table-cell>
            <table:table-cell office:value-type="string">
              <text:p text:style-name="Table_20_Contents"><text:span py:content="row['name']"/></text:p>
            </table:table-cell>
            <table:table-cell office:value-type="string">
              <text:p text:style-name="Table_20_Contents">Ja</text:p>
            </table:table-cell>
            <table:table-cell office:value-type="string">
              <text:p text:style-name="Table_20_Contents"><text:span py:content="row['allocation']"/></text:p>
            </table:table-cell>
          </table:table-row>
        </py:for>
      </table:table>
      <text:p text:style-name="Standard" py:if="not bk_groups">Für dieses Objekt sind keine Betriebskosten-Abrechnungseinheiten konfiguriert.</text:p>
      <text:p text:style-name="Standard">Umlageschlüssel-Erläuterung: Wohnfläche = anteilig nach m² der Wohnung zur Gesamtwohnfläche des Gebäudes · Wohneinheiten = je Wohnung gleicher Anteil · Verbrauch = nach Heizkostenverordnung (HeizkostenV), mind. 50 % nach Verbrauch · Änderungen des Umlageschlüssels durch den Vermieter nur bei sachlichem Grund und mit Ankündigung (§ 556a BGB).</text:p>
      <text:p text:style-name="Standard">Hinweise: Nicht in der Betriebskostenabrechnung umlegbar sind u. a.: Verwaltungskosten, Instandhaltungs- und Instandsetzungskosten, Rücklagen, Leerstandskosten sowie das Mietausfallwagnis (§ 1 Abs. 2 BetrKV). Die Abrechnung erfolgt jährlich zum Abrechnungszeitraum 01.01.–31.12. eines jeden Jahres. Der Vermieter ist zur Anpassung der Vorauszahlungen nach Vorlage der Abrechnung berechtigt (§ 560 Abs. 4 BGB).</text:p>
      <text:h text:style-name="Heading_2" text:outline-level="2">Unterschriften</text:h>
      <text:p text:style-name="Standard">Vermieter: ______________________ (Ort, Datum)</text:p>
      <text:p text:style-name="Standard">Mieter: ______________________ (Ort, Datum)</text:p>
      <text:p text:style-name="Standard">Anlage 4 zum Mietvertrag · Betriebskostenaufstellung § 2 BetrKV · Vertrag Nr. <text:span py:content="record.contract_number o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_1" style:display-name="Heading 1" style:family="paragraph" style:parent-style-name="Heading" style:next-style-name="Text_20_body" style:default-outline-level="1" style:class="text"/>
    <style:style style:name="Heading_2" style:display-name="Heading 2" style:family="paragraph" style:parent-style-name="Heading" style:next-style-name="Text_20_body" style:default-outline-level="2" style:class="text"/>
    <style:style style:name="Table_20_Heading" style:display-name="Table Heading" style:family="paragraph" style:parent-style-name="Table_20_Contents" style:class="extra">
      <style:text-properties fo:font-weight="bold"/>
    </style:style>
    <style:style style:name="Table_20_Contents" style:display-name="Table Contents" style:family="paragraph" style:parent-style-name="Standard" style:class="extra"/>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0" meta:image-count="0" meta:object-count="0" meta:page-count="1" meta:paragraph-count="1" meta:word-count="1" meta:character-count="11" meta:non-whitespace-character-count="11"/>
    <meta:generator>LibreOffice/25.8.1.1$MacOSX_AARCH64 LibreOffice_project/54047653041915e595ad4e45cccea684809c77b5</meta:generator>
  </office:meta>
</office:document-meta>
</file>