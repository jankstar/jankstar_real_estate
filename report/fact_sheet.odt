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py="http://genshi.edgewall.org/" office:version="1.4">
  <office:scripts/>
  <office:automatic-styles/>
  <office:body>
    <office:text>
      <text:h text:style-name="Heading_1" text:outline-level="1">Fact Sheet</text:h>
      <table:table table:name="TableBasic">
        <table:table-column table:number-columns-repeated="2"/>
        <table:table-row>
          <table:table-cell office:value-type="string">
            <text:p text:style-name="Table_20_Contents">Company</text:p>
          </table:table-cell>
          <table:table-cell office:value-type="string">
            <text:p text:style-name="Table_20_Contents"><text:span py:content="record.company.get_rec_name('')"/> (<text:span py:content="record.company.id"/>)</text:p>
          </table:table-cell>
        </table:table-row>
        <table:table-row>
          <table:table-cell office:value-type="string">
            <text:p text:style-name="Table_20_Contents">ID</text:p>
          </table:table-cell>
          <table:table-cell office:value-type="string">
            <text:p text:style-name="Table_20_Contents"><text:span py:content="record.id"/></text:p>
          </table:table-cell>
        </table:table-row>
        <table:table-row>
          <table:table-cell office:value-type="string">
            <text:p text:style-name="Table_20_Contents">Type</text:p>
          </table:table-cell>
          <table:table-cell office:value-type="string">
            <text:p text:style-name="Table_20_Contents"><text:span py:content="record.type"/></text:p>
          </table:table-cell>
        </table:table-row>
        <table:table-row>
          <table:table-cell office:value-type="string">
            <text:p text:style-name="Table_20_Contents">Sequence</text:p>
          </table:table-cell>
          <table:table-cell office:value-type="string">
            <text:p text:style-name="Table_20_Contents"><text:span py:content="record.sequence"/></text:p>
          </table:table-cell>
        </table:table-row>
        <table:table-row>
          <table:table-cell office:value-type="string">
            <text:p text:style-name="Table_20_Contents">No</text:p>
          </table:table-cell>
          <table:table-cell office:value-type="string">
            <text:p text:style-name="Table_20_Contents"><text:span py:content="record.object_number"/></text:p>
          </table:table-cell>
        </table:table-row>
        <table:table-row>
          <table:table-cell office:value-type="string">
            <text:p text:style-name="Table_20_Contents">Name</text:p>
          </table:table-cell>
          <table:table-cell office:value-type="string">
            <text:p text:style-name="Table_20_Contents"><text:span py:content="record.name"/></text:p>
          </table:table-cell>
        </table:table-row>
        <table:table-row>
          <table:table-cell office:value-type="string">
            <text:p text:style-name="Table_20_Contents">Start/End Date</text:p>
          </table:table-cell>
          <table:table-cell office:value-type="string">
            <text:p text:style-name="Table_20_Contents"><text:span py:content="record.start_date"/> / <text:span py:content="record.end_date"/></text:p>
          </table:table-cell>
        </table:table-row>
        <table:table-row py:if="record.address is not None">
          <table:table-cell office:value-type="string">
            <text:p text:style-name="Table_20_Contents">Address</text:p>
          </table:table-cell>
          <table:table-cell office:value-type="string">
            <text:p text:style-name="Table_20_Contents"><text:span py:content="record.address.street_name"/>, <text:span py:content="record.address.country.code"/>-<text:span py:content="record.address.postal_code"/> <text:span py:content="record.address.city"/></text:p>
          </table:table-cell>
        </table:table-row>
      </table:table>
      <text:h text:style-name="Heading_2" text:outline-level="2" py:if="len(record.measurements) &gt; 0">Measurement</text:h>
      <table:table table:name="TableMeasurement" py:if="len(record.measurements) &gt; 0">
        <table:table-column table:number-columns-repeated="4"/>
        <table:table-row py:for="obj in record.measurements">
          <table:table-cell office:value-type="string">
            <text:p text:style-name="Table_20_Contents"><text:span py:content="obj.valid_from"/></text:p>
          </table:table-cell>
          <table:table-cell office:value-type="string">
            <text:p text:style-name="Table_20_Contents"><text:span py:content="obj.m_type.name"/></text:p>
          </table:table-cell>
          <table:table-cell office:value-type="string">
            <text:p text:style-name="Table_20_Contents"><text:span py:content="obj.value"/></text:p>
          </table:table-cell>
          <table:table-cell office:value-type="string">
            <text:p text:style-name="Table_20_Contents"><text:span py:content="obj.symbol"/></text:p>
          </table:table-cell>
        </table:table-row>
      </table:table>
      <text:h text:style-name="Heading_2" text:outline-level="2" py:if="len(record.parties) &gt; 0">Parties</text:h>
      <table:table table:name="TableParties" py:if="len(record.parties) &gt; 0">
        <table:table-column table:number-columns-repeated="4"/>
        <table:table-row py:for="obj in record.parties">
          <table:table-cell office:value-type="string">
            <text:p text:style-name="Table_20_Contents"><text:span py:content="obj.valid_from"/></text:p>
          </table:table-cell>
          <table:table-cell office:value-type="string">
            <text:p text:style-name="Table_20_Contents"><text:span py:content="obj.party.name"/></text:p>
          </table:table-cell>
          <table:table-cell office:value-type="string">
            <text:p text:style-name="Table_20_Contents"><text:span py:content="obj.role.name"/></text:p>
          </table:table-cell>
          <table:table-cell office:value-type="string">
            <text:p text:style-name="Table_20_Contents"><text:span py:content="obj.valid_to"/></text:p>
          </table:table-cell>
        </table:table-row>
      </table:table>
      <text:h text:style-name="Heading_2" text:outline-level="2" py:if="record.number_of_objects &gt; 0">Children</text:h>
      <table:table table:name="TableChildren" py:if="record.number_of_objects &gt; 0">
        <table:table-column/>
        <table:table-row py:for="obj in record.children">
          <table:table-cell office:value-type="string">
            <text:p text:style-name="Table_20_Contents"><text:span py:content="obj.object_number"/> <text:span py:content="obj.compute_name"/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_1" style:display-name="Heading 1" style:family="paragraph" style:parent-style-name="Heading" style:next-style-name="Text_20_body" style:default-outline-level="1" style:class="text"/>
    <style:style style:name="Heading_2" style:display-name="Heading 2" style:family="paragraph" style:parent-style-name="Heading" style:next-style-name="Text_20_body" style:default-outline-level="2" style:class="text"/>
    <style:style style:name="Table_20_Heading" style:display-name="Table Heading" style:family="paragraph" style:parent-style-name="Table_20_Contents" style:class="extra">
      <style:text-properties fo:font-weight="bold"/>
    </style:style>
    <style:style style:name="Table_20_Contents" style:display-name="Table Contents" style:family="paragraph" style:parent-style-name="Standard" style:class="extra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1" meta:word-count="1" meta:character-count="11" meta:non-whitespace-character-count="11"/>
    <meta:generator>LibreOffice/25.8.1.1$MacOSX_AARCH64 LibreOffice_project/54047653041915e595ad4e45cccea684809c77b5</meta:generator>
  </office:meta>
</office:document-meta>
</file>