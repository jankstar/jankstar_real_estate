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fo="urn:oasis:names:tc:opendocument:xmlns:xsl-fo-compatible:1.0" xmlns:py="http://genshi.edgewall.org/" office:version="1.4">
  <office:scripts/>
  <office:automatic-styles/>
  <office:body>
    <office:text>
      <?python from decimal import Decimal
first_item = record.items[0] if record.items else None
obj = first_item.objects[0].object if first_item and first_item.objects else None
obj_addr = obj.address if obj else None
prop_addr = record.property.address if record.property else None
display_obj_addr = obj_addr or prop_addr
comp_party_addrs = record.company.party.addresses
comp_addr = comp_party_addrs[0] if comp_party_addrs else None
inv_addr = record.invoice_address
sig_date = _format(record.date_of_signature) if record.date_of_signature else datetime.datetime.now().strftime('%d.%m.%Y')
total_amount = sum((t.total_amount for t in record.terms if t.total_amount is not None), Decimal(0))
basement_nrs = [io.object.basement_nr for item in record.items for io in item.objects if io.object and io.object.basement_nr]
?>
      <text:h text:style-name="Heading_1" text:outline-level="1">Mietvertrag</text:h>
      <text:p text:style-name="Standard">Wohnraummietvertrag · § 535 ff. BGB</text:p>
      <text:p text:style-name="Standard">Vertragsnummer: <text:span py:content="record.contract_number or '—'"/> · Datum: <text:span py:content="sig_date"/> · Ort: <text:span py:content="comp_addr.city if comp_addr else '—'"/></text:p>
      <text:h text:style-name="Heading_2" text:outline-level="2">§ 1 Vertragsparteien</text:h>
      <text:p text:style-name="Standard">Vermieter</text:p>
      <text:p text:style-name="Standard">Name / Firma: <text:span py:content="record.company.get_rec_name('')"/></text:p>
      <text:p text:style-name="Standard">Straße, Hausnummer: <text:span py:content="comp_addr.street_single_line if comp_addr else '—'"/></text:p>
      <text:p text:style-name="Standard">PLZ, Ort: <text:span py:content="((comp_addr.postal_code or '') + ' ' + (comp_addr.city or '')).strip() if comp_addr else '—'"/></text:p>
      <text:p text:style-name="Standard">Ansprechpartner / Kontakt: <text:span py:content="user.name + (' · Tel. ' + user.phone if user.phone else '')"/></text:p>
      <text:p text:style-name="Standard">Mieter</text:p>
      <text:p text:style-name="Standard">Name, Vorname / Firma: <text:span py:content="record.contractual_partner.name"/></text:p>
      <text:p text:style-name="Standard">Anschrift (vor Einzug): <text:span py:content="inv_addr.street_single_line"/>, <text:span py:content="inv_addr.postal_code or ''"/> <text:span py:content="inv_addr.city or ''"/></text:p>
      <text:p text:style-name="Standard">Telefon: <text:span py:content="record.phone_partner or '—'"/></text:p>
      <text:p text:style-name="Standard">E-Mail:</text:p>
      <text:h text:style-name="Heading_2" text:outline-level="2">§ 2 Mietobjekt</text:h>
      <text:p text:style-name="Standard">Anschrift des Mietobjekts: <text:span py:content="display_obj_addr.street_single_line if display_obj_addr else '—'"/><text:span py:content="(', ' + (display_obj_addr.postal_code or '') + ' ' + (display_obj_addr.city or '')).strip(', ') if display_obj_addr and (display_obj_addr.postal_code or display_obj_addr.city) else ''"/></text:p>
      <text:p text:style-name="Standard">Bezeichnung / Lage: <text:span py:content="obj.name if obj else '—'"/></text:p>
      <text:p text:style-name="Standard">Wohnungs-Nr. / Kennung: <text:span py:content="obj.object_number if obj else '—'"/></text:p>
      <text:p text:style-name="Standard">Zur Wohnung gehören:</text:p>
      <text:p text:style-name="Standard">- Keller Nr. <text:span py:content="', '.join(basement_nrs) if basement_nrs else '_______'"/></text:p>
      <text:p text:style-name="Standard">- Stellplatz / Garage Nr. _______</text:p>
      <text:p text:style-name="Standard">- Dachbodenabteil</text:p>
      <text:p text:style-name="Standard">- Gartenmitbenutzung</text:p>
      <text:p text:style-name="Standard">- Sonstiges: ___________________________</text:p>
      <text:p text:style-name="Standard">Die Wohnung wird vermietet zum ausschließlichen Gebrauch als Wohnraum. Eine gewerbliche oder berufliche Nutzung bedarf der vorherigen schriftlichen Zustimmung des Vermieters.</text:p>
      <text:h text:style-name="Heading_2" text:outline-level="2">§ 3 Mietdauer</text:h>
      <text:p text:style-name="Standard">Mietbeginn: <text:span py:content="_format(record.start_date) if record.start_date else '—'"/></text:p>
      <text:p text:style-name="Standard">Mietende (leer = unbefristet): <text:span py:content="_format(record.end_date) if record.end_date else 'Unbefristet'"/></text:p>
      <text:p text:style-name="Standard" py:if="not record.end_date">Das Mietverhältnis wird auf unbestimmte Zeit geschlossen. Es kann von beiden Seiten unter Einhaltung der gesetzlichen Kündigungsfristen gemäß § 573c BGB gekündigt werden. Die ordentliche Kündigungsfrist für den Mieter beträgt 3 Monate zum Monatsende, sofern die Kündigung bis zum 3. Werktag des Kalendermonats eingeht.</text:p>
      <text:p text:style-name="Standard" py:if="record.end_date">Das Mietverhältnis ist auf bestimmte Zeit geschlossen und endet am <text:span py:content="_format(record.end_date)"/> ohne Kündigung.</text:p>
      <text:p text:style-name="Standard">Eine außerordentliche Kündigung bleibt unberührt. Die Kündigung bedarf der Schriftform.</text:p>
      <text:h text:style-name="Heading_2" text:outline-level="2">§ 4 Miete und Betriebskosten</text:h>
      <table:table table:name="TableMiete">
        <table:table-column table:number-columns-repeated="2"/>
        <table:table-row py:for="term in record.terms">
          <table:table-cell office:value-type="string">
            <text:p text:style-name="Table_20_Contents"><text:span py:content="term.term_type.name if term.term_type else term.name"/></text:p>
          </table:table-cell>
          <table:table-cell office:value-type="string">
            <text:p text:style-name="Table_20_Contents"><text:span py:content="_format(term.total_amount) if term.total_amount is not None else '—'"/> <text:span py:content="term.currency.symbol if term.currency else record.currency.symbol"/></text:p>
          </table:table-cell>
        </table:table-row>
        <table:table-row>
          <table:table-cell office:value-type="string">
            <text:p text:style-name="Table_20_Heading">Gesamtmiete (monatlich)</text:p>
          </table:table-cell>
          <table:table-cell office:value-type="string">
            <text:p text:style-name="Table_20_Heading"><text:span py:content="_format(total_amount)"/> <text:span py:content="record.currency.symbol"/></text:p>
          </table:table-cell>
        </table:table-row>
      </table:table>
      <text:p text:style-name="Standard">Die Miete ist monatlich im Voraus, spätestens am 3. Werktag eines jeden Monats, auf folgendes Konto des Vermieters zu überweisen:</text:p>
      <text:p text:style-name="Standard">Kontoinhaber:</text:p>
      <text:p text:style-name="Standard">Kreditinstitut:</text:p>
      <text:p text:style-name="Standard">IBAN:</text:p>
      <text:p text:style-name="Standard">BIC:</text:p>
      <text:p text:style-name="Standard">Über die Betriebskosten wird jährlich abgerechnet. Der Abrechnungszeitraum ist das Kalenderjahr. Die Abrechnung ist dem Mieter spätestens 12 Monate nach Ende des Abrechnungszeitraums zuzustellen (§ 556 Abs. 3 BGB). Guthaben werden erstattet, Nachzahlungen sind fällig. Betriebskosten werden gemäß § 2 BetrKV umgelegt. Der Umlageschlüssel ist die Wohnfläche, soweit nichts anderes angegeben.</text:p>
      <text:h text:style-name="Heading_2" text:outline-level="2">§ 5 Mietsicherheit (Kaution)</text:h>
      <text:p text:style-name="Standard">Der Mieter leistet eine Barkaution in Höhe von _____________ <text:span py:content="record.currency.symbol"/> (maximal 3 Nettokaltmieten, § 551 BGB). Die Kaution ist zu gleichen Teilen in den ersten drei Monaten des Mietverhältnisses zu zahlen, erstmals am _____________.</text:p>
      <text:p text:style-name="Standard">Der Vermieter ist verpflichtet, die Kaution getrennt von seinem Vermögen bei einem Kreditinstitut zu dem für Spareinlagen mit gesetzlicher Kündigungsfrist üblichen Zinssatz anzulegen (§ 551 Abs. 3 BGB). Die Kaution nebst aufgelaufener Zinsen wird nach Beendigung des Mietverhältnisses und vollständiger Klärung aller gegenseitigen Ansprüche zurückgezahlt.</text:p>
      <text:h text:style-name="Heading_2" text:outline-level="2">§ 6 Übergabe und Zustand der Mietsache</text:h>
      <text:p text:style-name="Standard">Die Übergabe der Wohnung erfolgt am <text:span py:content="_format(record.start_date) if record.start_date else '_____________'"/> im vertragsgemäßen Zustand. Ein gemeinsames Übergabeprotokoll wird erstellt und von beiden Parteien unterzeichnet. Es dokumentiert den Zustand der Wohnung, vorhandene Mängel sowie die Zählerstände für Strom, Gas und Wasser.</text:p>
      <text:p text:style-name="Standard">Der Mieter erhält folgende Schlüssel: ______ x Wohnungsschlüssel, ______ x Hausschlüssel, ______ x Briefkastenschlüssel, ______ x Sonstige: _____________.</text:p>
      <text:h text:style-name="Heading_2" text:outline-level="2">§ 7 Schönheitsreparaturen</text:h>
      <text:p text:style-name="Standard">Schönheitsreparaturen (Tapezieren, Streichen von Wänden, Decken, Heizkörpern, Innentüren, Fenster und Außentüren von innen) obliegen dem Vermieter, sofern keine wirksame abweichende Vereinbarung getroffen wurde.</text:p>
      <text:p text:style-name="Standard">Individuelle Vereinbarung (bei Bedarf ausfüllen):</text:p>
      <text:p text:style-name="Standard"> </text:p>
      <text:h text:style-name="Heading_2" text:outline-level="2">§ 8 Tierhaltung und Untervermietung</text:h>
      <text:p text:style-name="Standard">Die Haltung von Kleintieren (z. B. Hamster, Zierfische, Vögel in üblicher Zahl) ist gestattet. Die Haltung von Hunden und Katzen sowie sonstigen größeren Tieren bedarf der vorherigen schriftlichen Zustimmung des Vermieters.</text:p>
      <text:p text:style-name="Standard">Eine Untervermietung oder Überlassung der Wohnung an Dritte bedarf ebenfalls der vorherigen schriftlichen Zustimmung des Vermieters (§ 540 BGB). Bei berechtigtem Interesse des Mieters darf die Zustimmung nicht ohne triftigen Grund verweigert werden.</text:p>
      <text:h text:style-name="Heading_2" text:outline-level="2">§ 9 Instandhaltung, Mängelanzeige und Kleinreparaturen</text:h>
      <text:p text:style-name="Standard">Der Mieter ist verpflichtet, Mängel der Mietsache unverzüglich dem Vermieter anzuzeigen (§ 536c BGB). Unterlässt er die Anzeige, haftet er für den dadurch entstehenden Schaden.</text:p>
      <text:p text:style-name="Standard">Kleinreparaturen an Gegenständen, die dem häufigen und direkten Zugriff des Mieters ausgesetzt sind (Wasserhähne, Lichtschalter, Türschlösser, Fenstergriffe u. ä.), trägt der Mieter bis zu einem Betrag von 100 € je Einzelreparatur, maximal 8 % der Jahresnettokaltmiete pro Jahr.</text:p>
      <text:h text:style-name="Heading_2" text:outline-level="2">§ 10 Bauliche Veränderungen und Einbauten</text:h>
      <text:p text:style-name="Standard">Bauliche Veränderungen, Einbauten sowie Installationen bedürfen der vorherigen schriftlichen Zustimmung des Vermieters. Bei Auszug ist der ursprüngliche Zustand wiederherzustellen, sofern nicht ausdrücklich etwas anderes vereinbart wurde.</text:p>
      <text:h text:style-name="Heading_2" text:outline-level="2">§ 11 Hausordnung</text:h>
      <text:p text:style-name="Standard">Der Mieter verpflichtet sich, die Hausordnung einzuhalten. Die Hausordnung ist Bestandteil dieses Vertrages und wird als Anlage 1 beigefügt. Ruhezeiten sind: werktags 13:00-15:00 Uhr und 22:00-07:00 Uhr, sonn- und feiertags ganztägig.</text:p>
      <text:h text:style-name="Heading_2" text:outline-level="2">§ 12 Energieausweis</text:h>
      <text:p text:style-name="Standard">Der Vermieter hat dem Mieter vor Vertragsabschluss einen Energieausweis gemäß § 80 GEG vorgelegt. Art: Bedarfsausweis / Verbrauchsausweis. Energieeffizienzklasse: _______ Endenergiebedarf/-verbrauch: _______ kWh/(m²·a)</text:p>
      <text:h text:style-name="Heading_2" text:outline-level="2">§ 13 Sonstige Vereinbarungen</text:h>
      <text:p text:style-name="Standard" py:if="record.comment"><text:span py:content="record.comment"/></text:p>
      <text:p text:style-name="Standard" py:if="not record.comment"> </text:p>
      <text:h text:style-name="Heading_2" text:outline-level="2">§ 14 Vertragsanlagen</text:h>
      <text:p text:style-name="Standard">- Anlage 1: Hausordnung</text:p>
      <text:p text:style-name="Standard">- Anlage 2: Übergabeprotokoll</text:p>
      <text:p text:style-name="Standard">- Anlage 3: Grundriss der Wohnung</text:p>
      <text:p text:style-name="Standard">- Anlage 4: Betriebskostenaufstellung (§ 2 BetrKV)</text:p>
      <text:p text:style-name="Standard">- Anlage 5: ___________________________</text:p>
      <text:h text:style-name="Heading_2" text:outline-level="2">§ 15 Schlussbestimmungen</text:h>
      <text:p text:style-name="Standard">Änderungen und Ergänzungen dieses Vertrages bedürfen der Schriftform. Dies gilt auch für die Aufhebung des Schriftformerfordernisses. Mündliche Nebenabreden bestehen nicht.</text:p>
      <text:p text:style-name="Standard">Sollten einzelne Bestimmungen dieses Vertrages unwirksam sein oder werden, bleibt die Wirksamkeit der übrigen Bestimmungen unberührt. An die Stelle der unwirksamen Bestimmung tritt die gesetzliche Regelung.</text:p>
      <text:p text:style-name="Standard">Es gilt das Recht der Bundesrepublik Deutschland. Gerichtsstand ist, soweit gesetzlich zulässig, der Ort der Mietwohnung.</text:p>
      <text:h text:style-name="Heading_2" text:outline-level="2">Vertragsunterschriften</text:h>
      <text:p text:style-name="Standard">Vermieter: ______________________ (Ort, Datum) · <text:span py:content="record.company.get_rec_name('')"/></text:p>
      <text:p text:style-name="Standard">Mieter: ______________________ (Ort, Datum) · <text:span py:content="record.contractual_partner.name"/></text:p>
      <text:p text:style-name="Standard">Mieter (Person 2, falls vorhanden): ______________________ (Ort, Datum)</text:p>
      <text:p text:style-name="Standard">Empfang bestätigt: ______________________ (Datum) · Mieter bestätigt Erhalt einer Ausfertigung</text:p>
      <text:p text:style-name="Standard">Mietvertrag Nr. <text:span py:content="record.contract_number or '—'"/> · §§ 535 ff. BGB · <text:span py:content="record.company.get_rec_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Heading_1" style:display-name="Heading 1" style:family="paragraph" style:parent-style-name="Heading" style:next-style-name="Text_20_body" style:default-outline-level="1" style:class="text"/>
    <style:style style:name="Heading_2" style:display-name="Heading 2" style:family="paragraph" style:parent-style-name="Heading" style:next-style-name="Text_20_body" style:default-outline-level="2" style:class="text"/>
    <style:style style:name="Table_20_Heading" style:display-name="Table Heading" style:family="paragraph" style:parent-style-name="Table_20_Contents" style:class="extra">
      <style:text-properties fo:font-weight="bold"/>
    </style:style>
    <style:style style:name="Table_20_Contents" style:display-name="Table Contents" style:family="paragraph" style:parent-style-name="Standard" style:class="extra"/>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0" meta:image-count="0" meta:object-count="0" meta:page-count="1" meta:paragraph-count="1" meta:word-count="1" meta:character-count="11" meta:non-whitespace-character-count="11"/>
    <meta:generator>LibreOffice/25.8.1.1$MacOSX_AARCH64 LibreOffice_project/54047653041915e595ad4e45cccea684809c77b5</meta:generator>
  </office:meta>
</office:document-meta>
</file>