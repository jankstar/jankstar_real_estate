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xmlns:py="http://genshi.edgewall.org/" office:version="1.4">
  <office:scripts/>
  <office:automatic-styles/>
  <office:body>
    <office:text>
      <text:h text:style-name="Heading_1" text:outline-level="1">Contract</text:h>
      <table:table table:name="TableBasic">
        <table:table-column table:number-columns-repeated="2"/>
        <table:table-row>
          <table:table-cell office:value-type="string">
            <text:p text:style-name="Table_20_Contents">Company</text:p>
          </table:table-cell>
          <table:table-cell office:value-type="string">
            <text:p text:style-name="Table_20_Contents"><text:span py:content="record.company.get_rec_name('')"/> (<text:span py:content="record.company.id"/>)</text:p>
          </table:table-cell>
        </table:table-row>
        <table:table-row>
          <table:table-cell office:value-type="string">
            <text:p text:style-name="Table_20_Contents">ID</text:p>
          </table:table-cell>
          <table:table-cell office:value-type="string">
            <text:p text:style-name="Table_20_Contents"><text:span py:content="record.id"/></text:p>
          </table:table-cell>
        </table:table-row>
        <table:table-row>
          <table:table-cell office:value-type="string">
            <text:p text:style-name="Table_20_Contents">Type</text:p>
          </table:table-cell>
          <table:table-cell office:value-type="string">
            <text:p text:style-name="Table_20_Contents"><text:span py:content="record.c_type.name"/></text:p>
          </table:table-cell>
        </table:table-row>
        <table:table-row>
          <table:table-cell office:value-type="string">
            <text:p text:style-name="Table_20_Contents">Sequence</text:p>
          </table:table-cell>
          <table:table-cell office:value-type="string">
            <text:p text:style-name="Table_20_Contents"><text:span py:content="record.sequence"/></text:p>
          </table:table-cell>
        </table:table-row>
        <table:table-row>
          <table:table-cell office:value-type="string">
            <text:p text:style-name="Table_20_Contents">No</text:p>
          </table:table-cell>
          <table:table-cell office:value-type="string">
            <text:p text:style-name="Table_20_Contents"><text:span py:content="record.contract_number"/></text:p>
          </table:table-cell>
        </table:table-row>
        <table:table-row>
          <table:table-cell office:value-type="string">
            <text:p text:style-name="Table_20_Contents">Name</text:p>
          </table:table-cell>
          <table:table-cell office:value-type="string">
            <text:p text:style-name="Table_20_Contents"><text:span py:content="record.name"/></text:p>
          </table:table-cell>
        </table:table-row>
        <table:table-row>
          <table:table-cell office:value-type="string">
            <text:p text:style-name="Table_20_Contents">Start/End Date</text:p>
          </table:table-cell>
          <table:table-cell office:value-type="string">
            <text:p text:style-name="Table_20_Contents"><text:span py:content="record.start_date"/> / <text:span py:content="record.end_date"/></text:p>
          </table:table-cell>
        </table:table-row>
        <table:table-row py:if="record.contractual_partner is not None">
          <table:table-cell office:value-type="string">
            <text:p text:style-name="Table_20_Contents">Party</text:p>
          </table:table-cell>
          <table:table-cell office:value-type="string">
            <text:p text:style-name="Table_20_Contents"><text:span py:content="record.contractual_partner.name"/></text:p>
          </table:table-cell>
        </table:table-row>
        <table:table-row py:if="record.invoice_address is not None">
          <table:table-cell office:value-type="string">
            <text:p text:style-name="Table_20_Contents">Invoice Address</text:p>
          </table:table-cell>
          <table:table-cell office:value-type="string">
            <text:p text:style-name="Table_20_Contents"><text:span py:content="record.get_address_partner()"/></text:p>
          </table:table-cell>
        </table:table-row>
        <table:table-row py:if="record.phone_partner is not None">
          <table:table-cell office:value-type="string">
            <text:p text:style-name="Table_20_Contents">Phone Partner</text:p>
          </table:table-cell>
          <table:table-cell office:value-type="string">
            <text:p text:style-name="Table_20_Contents"><text:span py:content="record.phone_partner"/></text:p>
          </table:table-cell>
        </table:table-row>
        <table:table-row py:if="record.payment_term is not None">
          <table:table-cell office:value-type="string">
            <text:p text:style-name="Table_20_Contents">Payment Term</text:p>
          </table:table-cell>
          <table:table-cell office:value-type="string">
            <text:p text:style-name="Table_20_Contents"><text:span py:content="record.payment_term.name"/></text:p>
          </table:table-cell>
        </table:table-row>
      </table:table>
      <text:h text:style-name="Heading_2" text:outline-level="2" py:if="len(record.items) &gt; 0">Contract Items</text:h>
      <table:table table:name="TableItems" py:if="len(record.items) &gt; 0">
        <table:table-column table:number-columns-repeated="3"/>
        <table:table-row py:for="obj in record.items">
          <table:table-cell office:value-type="string">
            <text:p text:style-name="Table_20_Contents"><text:span py:content="obj.sequence"/></text:p>
          </table:table-cell>
          <table:table-cell office:value-type="string">
            <text:p text:style-name="Table_20_Contents"><text:span py:content="obj.valid_from"/></text:p>
          </table:table-cell>
          <table:table-cell office:value-type="string">
            <text:p text:style-name="Table_20_Contents"><text:span py:content="obj.name"/></text:p>
          </table:table-cell>
        </table:table-row>
      </table:table>
      <text:h text:style-name="Heading_2" text:outline-level="2" py:if="len(record.terms) &gt; 0">Terms</text:h>
      <table:table table:name="TableTerms" py:if="len(record.terms) &gt; 0">
        <table:table-column table:number-columns-repeated="5"/>
        <table:table-row py:for="obj in record.terms">
          <table:table-cell office:value-type="string">
            <text:p text:style-name="Table_20_Contents"><text:span py:content="obj.sequence"/></text:p>
          </table:table-cell>
          <table:table-cell office:value-type="string">
            <text:p text:style-name="Table_20_Contents"><text:span py:content="obj.valid_from"/></text:p>
          </table:table-cell>
          <table:table-cell office:value-type="string">
            <text:p text:style-name="Table_20_Contents"><text:span py:content="obj.name"/></text:p>
          </table:table-cell>
          <table:table-cell office:value-type="string">
            <text:p text:style-name="Table_20_Contents"><text:span py:content="obj.amount"/> <text:span py:content="obj.currency.symbol"/></text:p>
          </table:table-cell>
          <table:table-cell office:value-type="string">
            <text:p text:style-name="Table_20_Contents"><text:span py:content="obj.valid_to"/>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_1" style:display-name="Heading 1" style:family="paragraph" style:parent-style-name="Heading" style:next-style-name="Text_20_body" style:default-outline-level="1" style:class="text"/>
    <style:style style:name="Heading_2" style:display-name="Heading 2" style:family="paragraph" style:parent-style-name="Heading" style:next-style-name="Text_20_body" style:default-outline-level="2" style:class="text"/>
    <style:style style:name="Table_20_Heading" style:display-name="Table Heading" style:family="paragraph" style:parent-style-name="Table_20_Contents" style:class="extra">
      <style:text-properties fo:font-weight="bold"/>
    </style:style>
    <style:style style:name="Table_20_Contents" style:display-name="Table Contents" style:family="paragraph" style:parent-style-name="Standard" style:class="extra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0" meta:image-count="0" meta:object-count="0" meta:page-count="1" meta:paragraph-count="1" meta:word-count="1" meta:character-count="11" meta:non-whitespace-character-count="11"/>
    <meta:generator>LibreOffice/25.8.1.1$MacOSX_AARCH64 LibreOffice_project/54047653041915e595ad4e45cccea684809c77b5</meta:generator>
  </office:meta>
</office:document-meta>
</file>